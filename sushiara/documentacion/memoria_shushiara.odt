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xmlns:svg="urn:oasis:names:tc:opendocument:xmlns:svg-compatible:1.0" office:version="1.2">
  <office:automatic-styles>
    <style:style style:name="Body" style:family="paragraph">
      <style:paragraph-properties fo:margin-bottom="0.25cm" fo:line-height="145%"/>
      <style:text-properties fo:font-size="11pt" style:font-name="Arial"/>
    </style:style>
    <style:style style:name="Subtitle" style:family="paragraph">
      <style:paragraph-properties fo:margin-bottom="0.5cm"/>
      <style:text-properties fo:font-size="15pt" fo:font-weight="bold" fo:color="#c91f24"/>
    </style:style>
    <style:style style:name="Heading_1" style:family="paragraph">
      <style:paragraph-properties fo:margin-top="0.2cm" fo:margin-bottom="0.45cm"/>
      <style:text-properties fo:font-size="22pt" fo:font-weight="bold" fo:color="#111111"/>
    </style:style>
    <style:style style:name="Heading_2" style:family="paragraph">
      <style:paragraph-properties fo:margin-top="0.35cm" fo:margin-bottom="0.18cm"/>
      <style:text-properties fo:font-size="15pt" fo:font-weight="bold" fo:color="#c91f24"/>
    </style:style>
    <style:style style:name="PageBreak" style:family="paragraph">
      <style:paragraph-properties fo:break-before="page"/>
    </style:style>
    <style:style style:name="TableHeader" style:family="paragraph">
      <style:text-properties fo:font-weight="bold" fo:color="#ffffff" fo:font-size="10pt"/>
    </style:style>
    <style:style style:name="TableCell" style:family="paragraph">
      <style:text-properties fo:font-size="9.5pt"/>
    </style:style>
    <style:style style:name="CodeTitle" style:family="paragraph">
      <style:text-properties fo:font-weight="bold" fo:color="#c91f24"/>
    </style:style>
    <style:style style:name="Code" style:family="paragraph">
      <style:paragraph-properties fo:background-color="#f2f2f2" fo:padding="0.2cm"/>
      <style:text-properties style:font-name="Consolas" fo:font-size="8.5pt"/>
    </style:style>
    <style:style style:name="CaptureTitle" style:family="paragraph">
      <style:text-properties fo:font-weight="bold" fo:color="#c91f24"/>
    </style:style>
    <style:style style:name="Capture" style:family="paragraph">
      <style:paragraph-properties fo:background-color="#fff0f0" fo:padding="0.2cm"/>
      <style:text-properties fo:font-size="10pt"/>
    </style:style>
    <style:list-style style:name="BulletList">
      <text:list-level-style-bullet text:level="1" text:bullet-char="-">
        <style:list-level-properties text:min-label-width="0.5cm"/>
      </text:list-level-style-bullet>
    </style:list-style>
  </office:automatic-styles>
  <office:body>
    <office:text>
      <text:h text:outline-level="1" text:style-name="Heading_1">Memoria del proyecto Shushiara</text:h>
      <text:p text:style-name="Subtitle">Aplicacion web de pedidos, reservas y administracion para restaurante japones.</text:p>
      <text:p text:style-name="Body">Proyecto final de 2DAW. Tecnologias: PHP puro, JavaScript puro, MySQL, phpMyAdmin, Bootstrap y XAMPP.</text:p>
      <text:p text:style-name="Body">Version actualizada con pago simulado, horario real por dia, envio de 5,00 EUR, hora obligatoria y panel de administracion protegido.</text:p>
      <text:p text:style-name="Body">Autor/a: ____________________</text:p>
      <text:p text:style-name="Body">Centro: ____________________</text:p>
      <text:p text:style-name="Body">Curso: 2DAW</text:p>
      <text:p text:style-name="Body">Fecha: Mayo de 2026</text:p>
      <text:p text:style-name="PageBreak"/>
      <text:h text:outline-level="1" text:style-name="Heading_1">Indice</text:h>
      <text:list text:style-name="BulletList">
        <text:list-item>
          <text:p text:style-name="Body">1. Introduccion y objetivos</text:p>
        </text:list-item>
        <text:list-item>
          <text:p text:style-name="Body">2. Descripcion general del sistema</text:p>
        </text:list-item>
        <text:list-item>
          <text:p text:style-name="Body">3. Tecnologias utilizadas</text:p>
        </text:list-item>
        <text:list-item>
          <text:p text:style-name="Body">4. Estructura del proyecto</text:p>
        </text:list-item>
        <text:list-item>
          <text:p text:style-name="Body">5. Modelo entidad-relacion</text:p>
        </text:list-item>
        <text:list-item>
          <text:p text:style-name="Body">6. Base de datos</text:p>
        </text:list-item>
        <text:list-item>
          <text:p text:style-name="Body">7. Diseno visual</text:p>
        </text:list-item>
        <text:list-item>
          <text:p text:style-name="Body">8. Carta y carrito</text:p>
        </text:list-item>
        <text:list-item>
          <text:p text:style-name="Body">9. Pedidos</text:p>
        </text:list-item>
        <text:list-item>
          <text:p text:style-name="Body">10. Pago simulado</text:p>
        </text:list-item>
        <text:list-item>
          <text:p text:style-name="Body">11. Envio y recogida</text:p>
        </text:list-item>
        <text:list-item>
          <text:p text:style-name="Body">12. Reservas</text:p>
        </text:list-item>
        <text:list-item>
          <text:p text:style-name="Body">13. Horarios</text:p>
        </text:list-item>
        <text:list-item>
          <text:p text:style-name="Body">14. Administracion</text:p>
        </text:list-item>
        <text:list-item>
          <text:p text:style-name="Body">15. Seguridad</text:p>
        </text:list-item>
        <text:list-item>
          <text:p text:style-name="Body">16. Validaciones</text:p>
        </text:list-item>
        <text:list-item>
          <text:p text:style-name="Body">17. Pruebas</text:p>
        </text:list-item>
        <text:list-item>
          <text:p text:style-name="Body">18. Instalacion</text:p>
        </text:list-item>
        <text:list-item>
          <text:p text:style-name="Body">19. Manual de usuario</text:p>
        </text:list-item>
        <text:list-item>
          <text:p text:style-name="Body">20. Manual de administrador</text:p>
        </text:list-item>
        <text:list-item>
          <text:p text:style-name="Body">21. Capturas pendientes</text:p>
        </text:list-item>
        <text:list-item>
          <text:p text:style-name="Body">22. Conclusiones</text:p>
        </text:list-item>
      </text:list>
      <text:p text:style-name="PageBreak"/>
      <text:h text:outline-level="1" text:style-name="Heading_1">1. Introduccion y objetivos</text:h>
      <text:h text:outline-level="2" text:style-name="Heading_2">1.1 Contexto</text:h>
      <text:p text:style-name="Body">Shushiara es una aplicacion web pensada para un restaurante japones moderno. El proyecto combina una web publica cuidada, una carta online con carrito, un sistema de pedidos, reservas de mesa y un panel de administracion protegido.</text:p>
      <text:h text:outline-level="2" text:style-name="Heading_2">1.2 Objetivos</text:h>
      <text:list text:style-name="BulletList">
        <text:list-item>
          <text:p text:style-name="Body">Crear una web visualmente profesional y seria.</text:p>
        </text:list-item>
        <text:list-item>
          <text:p text:style-name="Body">Permitir pedidos con carrito y pago simulado.</text:p>
        </text:list-item>
        <text:list-item>
          <text:p text:style-name="Body">Permitir reservas sin pago previo.</text:p>
        </text:list-item>
        <text:list-item>
          <text:p text:style-name="Body">Guardar datos en MySQL.</text:p>
        </text:list-item>
        <text:list-item>
          <text:p text:style-name="Body">Aplicar validaciones en JavaScript y PHP.</text:p>
        </text:list-item>
        <text:list-item>
          <text:p text:style-name="Body">Documentar el proyecto para explicarlo en una defensa de 2DAW.</text:p>
        </text:list-item>
      </text:list>
      <text:h text:outline-level="2" text:style-name="Heading_2">1.3 Alcance</text:h>
      <text:p text:style-name="Body">El proyecto no realiza cobros reales ni envia notificaciones externas. Su objetivo es demostrar el flujo completo de una aplicacion de restaurante en entorno local, manteniendo el codigo entendible y defendible.</text:p>
      <text:p text:style-name="PageBreak"/>
      <text:h text:outline-level="1" text:style-name="Heading_1">2. Descripcion general del sistema</text:h>
      <text:p text:style-name="Body">La aplicacion se divide en web publica, servicios backend y panel interno. La web publica permite a clientes consultar informacion, hacer pedidos y reservar mesa. Los servicios PHP reciben los formularios en JSON, validan la informacion y guardan en MySQL. El panel interno permite gestionar los registros.</text:p>
      <table:table table:name="Tabla">
        <table:table-row>
          <table:table-cell office:value-type="string">
            <text:p text:style-name="TableHeader">Area</text:p>
          </table:table-cell>
          <table:table-cell office:value-type="string">
            <text:p text:style-name="TableHeader">Funcion</text:p>
          </table:table-cell>
          <table:table-cell office:value-type="string">
            <text:p text:style-name="TableHeader">Archivos</text:p>
          </table:table-cell>
        </table:table-row>
        <table:table-row>
          <table:table-cell office:value-type="string">
            <text:p text:style-name="TableCell">Web publica</text:p>
          </table:table-cell>
          <table:table-cell office:value-type="string">
            <text:p text:style-name="TableCell">Inicio, carta, pedido y reserva</text:p>
          </table:table-cell>
          <table:table-cell office:value-type="string">
            <text:p text:style-name="TableCell">index.php, paginas/pedido.php, paginas/reservar.php</text:p>
          </table:table-cell>
        </table:table-row>
        <table:table-row>
          <table:table-cell office:value-type="string">
            <text:p text:style-name="TableCell">Servicios</text:p>
          </table:table-cell>
          <table:table-cell office:value-type="string">
            <text:p text:style-name="TableCell">Validar y guardar datos</text:p>
          </table:table-cell>
          <table:table-cell office:value-type="string">
            <text:p text:style-name="TableCell">servicios/pedidos.php, servicios/reservas.php</text:p>
          </table:table-cell>
        </table:table-row>
        <table:table-row>
          <table:table-cell office:value-type="string">
            <text:p text:style-name="TableCell">Administracion</text:p>
          </table:table-cell>
          <table:table-cell office:value-type="string">
            <text:p text:style-name="TableCell">Login y gestion</text:p>
          </table:table-cell>
          <table:table-cell office:value-type="string">
            <text:p text:style-name="TableCell">administracion/*.php</text:p>
          </table:table-cell>
        </table:table-row>
        <table:table-row>
          <table:table-cell office:value-type="string">
            <text:p text:style-name="TableCell">Base de datos</text:p>
          </table:table-cell>
          <table:table-cell office:value-type="string">
            <text:p text:style-name="TableCell">Persistencia</text:p>
          </table:table-cell>
          <table:table-cell office:value-type="string">
            <text:p text:style-name="TableCell">base_de_datos/esquema.sql</text:p>
          </table:table-cell>
        </table:table-row>
      </table:table>
      <text:p text:style-name="Body">Esta separacion permite explicar claramente que parte se ejecuta en el navegador y que parte se ejecuta en el servidor.</text:p>
      <text:p text:style-name="PageBreak"/>
      <text:h text:outline-level="1" text:style-name="Heading_1">3. Tecnologias utilizadas</text:h>
      <table:table table:name="Tabla">
        <table:table-row>
          <table:table-cell office:value-type="string">
            <text:p text:style-name="TableHeader">Tecnologia</text:p>
          </table:table-cell>
          <table:table-cell office:value-type="string">
            <text:p text:style-name="TableHeader">Uso</text:p>
          </table:table-cell>
          <table:table-cell office:value-type="string">
            <text:p text:style-name="TableHeader">Ubicacion</text:p>
          </table:table-cell>
        </table:table-row>
        <table:table-row>
          <table:table-cell office:value-type="string">
            <text:p text:style-name="TableCell">HTML5</text:p>
          </table:table-cell>
          <table:table-cell office:value-type="string">
            <text:p text:style-name="TableCell">Estructura semantica de paginas publicas y administracion.</text:p>
          </table:table-cell>
          <table:table-cell office:value-type="string">
            <text:p text:style-name="TableCell">index.php, paginas/*.php</text:p>
          </table:table-cell>
        </table:table-row>
        <table:table-row>
          <table:table-cell office:value-type="string">
            <text:p text:style-name="TableCell">CSS3</text:p>
          </table:table-cell>
          <table:table-cell office:value-type="string">
            <text:p text:style-name="TableCell">Estilo visual profesional, bloques cuadrados, responsive y footer.</text:p>
          </table:table-cell>
          <table:table-cell office:value-type="string">
            <text:p text:style-name="TableCell">recursos/css/estilos.css</text:p>
          </table:table-cell>
        </table:table-row>
        <table:table-row>
          <table:table-cell office:value-type="string">
            <text:p text:style-name="TableCell">Bootstrap 5</text:p>
          </table:table-cell>
          <table:table-cell office:value-type="string">
            <text:p text:style-name="TableCell">Grid, botones, formularios y base responsive.</text:p>
          </table:table-cell>
          <table:table-cell office:value-type="string">
            <text:p text:style-name="TableCell">CDN</text:p>
          </table:table-cell>
        </table:table-row>
        <table:table-row>
          <table:table-cell office:value-type="string">
            <text:p text:style-name="TableCell">JavaScript puro</text:p>
          </table:table-cell>
          <table:table-cell office:value-type="string">
            <text:p text:style-name="TableCell">Carrito, filtros, horarios, pago simulado y fetch.</text:p>
          </table:table-cell>
          <table:table-cell office:value-type="string">
            <text:p text:style-name="TableCell">recursos/js</text:p>
          </table:table-cell>
        </table:table-row>
        <table:table-row>
          <table:table-cell office:value-type="string">
            <text:p text:style-name="TableCell">PHP puro</text:p>
          </table:table-cell>
          <table:table-cell office:value-type="string">
            <text:p text:style-name="TableCell">Servicios, validaciones, sesiones y panel interno.</text:p>
          </table:table-cell>
          <table:table-cell office:value-type="string">
            <text:p text:style-name="TableCell">servicios, administracion</text:p>
          </table:table-cell>
        </table:table-row>
        <table:table-row>
          <table:table-cell office:value-type="string">
            <text:p text:style-name="TableCell">PDO</text:p>
          </table:table-cell>
          <table:table-cell office:value-type="string">
            <text:p text:style-name="TableCell">Conexion segura y consultas preparadas.</text:p>
          </table:table-cell>
          <table:table-cell office:value-type="string">
            <text:p text:style-name="TableCell">incluye/bd.php</text:p>
          </table:table-cell>
        </table:table-row>
        <table:table-row>
          <table:table-cell office:value-type="string">
            <text:p text:style-name="TableCell">MySQL/MariaDB</text:p>
          </table:table-cell>
          <table:table-cell office:value-type="string">
            <text:p text:style-name="TableCell">Persistencia de productos, pedidos, reservas y admin.</text:p>
          </table:table-cell>
          <table:table-cell office:value-type="string">
            <text:p text:style-name="TableCell">base_de_datos/esquema.sql</text:p>
          </table:table-cell>
        </table:table-row>
        <table:table-row>
          <table:table-cell office:value-type="string">
            <text:p text:style-name="TableCell">phpMyAdmin</text:p>
          </table:table-cell>
          <table:table-cell office:value-type="string">
            <text:p text:style-name="TableCell">Importacion y revision de datos.</text:p>
          </table:table-cell>
          <table:table-cell office:value-type="string">
            <text:p text:style-name="TableCell">localhost/phpmyadmin</text:p>
          </table:table-cell>
        </table:table-row>
        <table:table-row>
          <table:table-cell office:value-type="string">
            <text:p text:style-name="TableCell">XAMPP</text:p>
          </table:table-cell>
          <table:table-cell office:value-type="string">
            <text:p text:style-name="TableCell">Entorno local Apache y MySQL.</text:p>
          </table:table-cell>
          <table:table-cell office:value-type="string">
            <text:p text:style-name="TableCell">C:\xampp\htdocs\sushiara</text:p>
          </table:table-cell>
        </table:table-row>
      </table:table>
      <text:p text:style-name="Body">La eleccion de PHP puro y JavaScript puro permite demostrar conocimientos fundamentales sin depender de frameworks complejos. Bootstrap ayuda en la estructura responsive, pero el diseno final esta personalizado con CSS propio.</text:p>
      <text:p text:style-name="PageBreak"/>
      <text:h text:outline-level="1" text:style-name="Heading_1">4. Estructura del proyecto</text:h>
      <text:p text:style-name="Body">El proyecto esta organizado por responsabilidades. Las paginas publicas se separan de servicios y administracion, y los recursos se agrupan en carpetas de CSS, JavaScript e imagenes.</text:p>
      <text:p text:style-name="CodeTitle">Arbol resumido</text:p>
      <text:p text:style-name="Code">sushiara/
|-- administracion/
|-- base_de_datos/
|-- documentacion/
|-- incluye/
|-- paginas/
|-- recursos/
|   |-- css/
|   |-- imagenes/
|   `-- js/
|-- servicios/
|-- index.php
|-- README.md
`-- AGENTS.md</text:p>
      <text:p text:style-name="Body">La estructura utiliza nombres en espanol para cumplir con la preferencia del proyecto y facilitar su lectura.</text:p>
      <text:p text:style-name="PageBreak"/>
      <text:h text:outline-level="1" text:style-name="Heading_1">5. Modelo entidad-relacion</text:h>
      <table:table table:name="Tabla">
        <table:table-row>
          <table:table-cell office:value-type="string">
            <text:p text:style-name="TableHeader">Tabla</text:p>
          </table:table-cell>
          <table:table-cell office:value-type="string">
            <text:p text:style-name="TableHeader">Funcion</text:p>
          </table:table-cell>
          <table:table-cell office:value-type="string">
            <text:p text:style-name="TableHeader">Campos destacados</text:p>
          </table:table-cell>
        </table:table-row>
        <table:table-row>
          <table:table-cell office:value-type="string">
            <text:p text:style-name="TableCell">productos</text:p>
          </table:table-cell>
          <table:table-cell office:value-type="string">
            <text:p text:style-name="TableCell">Catalogo de carta</text:p>
          </table:table-cell>
          <table:table-cell office:value-type="string">
            <text:p text:style-name="TableCell">id, nombre, descripcion, categoria, precio, imagen, etiqueta, picante, activo</text:p>
          </table:table-cell>
        </table:table-row>
        <table:table-row>
          <table:table-cell office:value-type="string">
            <text:p text:style-name="TableCell">pedidos</text:p>
          </table:table-cell>
          <table:table-cell office:value-type="string">
            <text:p text:style-name="TableCell">Cabecera del pedido</text:p>
          </table:table-cell>
          <table:table-cell office:value-type="string">
            <text:p text:style-name="TableCell">cliente, entrega, fecha, hora, metodo_pago, referencia_pago, subtotal, envio, total, estado</text:p>
          </table:table-cell>
        </table:table-row>
        <table:table-row>
          <table:table-cell office:value-type="string">
            <text:p text:style-name="TableCell">detalles_pedido</text:p>
          </table:table-cell>
          <table:table-cell office:value-type="string">
            <text:p text:style-name="TableCell">Lineas del pedido</text:p>
          </table:table-cell>
          <table:table-cell office:value-type="string">
            <text:p text:style-name="TableCell">pedido_id, producto_id, nombre_producto, precio_unitario, cantidad, subtotal</text:p>
          </table:table-cell>
        </table:table-row>
        <table:table-row>
          <table:table-cell office:value-type="string">
            <text:p text:style-name="TableCell">reservas</text:p>
          </table:table-cell>
          <table:table-cell office:value-type="string">
            <text:p text:style-name="TableCell">Reservas de mesa</text:p>
          </table:table-cell>
          <table:table-cell office:value-type="string">
            <text:p text:style-name="TableCell">cliente, telefono, email, fecha, hora, personas, zona, ocasion, estado</text:p>
          </table:table-cell>
        </table:table-row>
        <table:table-row>
          <table:table-cell office:value-type="string">
            <text:p text:style-name="TableCell">administradores</text:p>
          </table:table-cell>
          <table:table-cell office:value-type="string">
            <text:p text:style-name="TableCell">Acceso interno</text:p>
          </table:table-cell>
          <table:table-cell office:value-type="string">
            <text:p text:style-name="TableCell">usuario, clave_hash</text:p>
          </table:table-cell>
        </table:table-row>
      </table:table>
      <text:p text:style-name="Body">La relacion mas importante es pedidos con detalles_pedido. Un pedido puede contener varias lineas, y cada linea referencia un producto. Las reservas se guardan aparte porque no dependen de productos de carta.</text:p>
      <text:list text:style-name="BulletList">
        <text:list-item>
          <text:p text:style-name="Body">productos 1 - N detalles_pedido</text:p>
        </text:list-item>
        <text:list-item>
          <text:p text:style-name="Body">pedidos 1 - N detalles_pedido</text:p>
        </text:list-item>
        <text:list-item>
          <text:p text:style-name="Body">reservas independiente</text:p>
        </text:list-item>
        <text:list-item>
          <text:p text:style-name="Body">administradores independiente</text:p>
        </text:list-item>
      </text:list>
      <text:p text:style-name="PageBreak"/>
      <text:h text:outline-level="1" text:style-name="Heading_1">6. Base de datos</text:h>
      <text:p text:style-name="Body">La base de datos se llama sushiara y se crea desde base_de_datos/esquema.sql. El script tambien inserta productos iniciales y el usuario administrador.</text:p>
      <text:p text:style-name="Body">La tabla pedidos incluye metodo_pago, pago_simulado y referencia_pago. Esto permite demostrar el flujo de pago sin almacenar datos sensibles.</text:p>
      <text:p text:style-name="CodeTitle">Fragmento conceptual de pedidos</text:p>
      <text:p text:style-name="Code">pedidos(id, nombre_cliente, telefono_cliente, direccion_cliente, tipo_entrega, fecha_entrega, hora_entrega, metodo_pago, pago_simulado, referencia_pago, subtotal, gastos_envio, total, estado)</text:p>
      <text:p text:style-name="CaptureTitle">CAPTURA PENDIENTE: phpMyAdmin</text:p>
      <text:p text:style-name="Capture">Inserta aqui una captura de phpMyAdmin mostrando las tablas productos, pedidos, detalles_pedido, reservas y administradores.</text:p>
      <text:p text:style-name="PageBreak"/>
      <text:h text:outline-level="1" text:style-name="Heading_1">7. Diseno visual y experiencia de usuario</text:h>
      <text:p text:style-name="Body">La estetica se basa en un estilo profesional, cuadrado y serio. Se utilizan colores negro, blanco y rojo, imagenes reales de productos y bloques bien definidos.</text:p>
      <text:p text:style-name="Body">La pagina principal introduce el restaurante, muestra el logo, explica quienes somos, ensena horarios y ofrece accesos claros a reservar mesa o hacer pedido.</text:p>
      <text:p text:style-name="Body">El footer se ha trabajado para mostrar informacion de contacto, direccion en Valencia, telefono, email y horarios sin dejar el final de la pagina vacio.</text:p>
      <text:p text:style-name="CaptureTitle">CAPTURA PENDIENTE: portada</text:p>
      <text:p text:style-name="Capture">Inserta una captura de la pagina principal de Shushiara.</text:p>
      <text:p text:style-name="PageBreak"/>
      <text:h text:outline-level="1" text:style-name="Heading_1">8. Carta y carrito</text:h>
      <text:p text:style-name="Body">La carta se carga desde la tabla productos. Los productos se agrupan por categorias como promociones, combos, entrantes, rolls, ramen, sopas, postres y bebidas.</text:p>
      <text:p text:style-name="Body">El carrito se gestiona en JavaScript mediante un Map. Esto permite aumentar, reducir y eliminar productos antes de enviar el pedido.</text:p>
      <text:p text:style-name="CodeTitle">Concepto del carrito</text:p>
      <text:p text:style-name="Code">const carrito = new Map();
subtotal = suma(precio * cantidad);
envio = domicilio ? 5 : 0;
total = subtotal + envio;</text:p>
      <text:p text:style-name="CaptureTitle">CAPTURA PENDIENTE: carta</text:p>
      <text:p text:style-name="Capture">Inserta una captura donde se vea la carta, categorias y carrito lateral.</text:p>
      <text:p text:style-name="PageBreak"/>
      <text:h text:outline-level="1" text:style-name="Heading_1">9. Pedidos</text:h>
      <text:p text:style-name="Body">El pedido exige datos del cliente, telefono, direccion, fecha, hora, tipo de entrega y metodo de pago. La hora es obligatoria; se elimino la opcion "lo antes posible" para que todos los pedidos tengan una franja concreta.</text:p>
      <text:p text:style-name="Body">El backend no confia en los precios que vienen del navegador. PHP consulta los productos reales en MySQL y recalcula subtotal, gastos de envio y total.</text:p>
      <text:p text:style-name="Body">El pedido se guarda en una transaccion: primero cabecera en pedidos y despues lineas en detalles_pedido. Si falla algo, se revierte la operacion.</text:p>
      <text:p text:style-name="PageBreak"/>
      <text:h text:outline-level="1" text:style-name="Heading_1">10. Pago simulado</text:h>
      <text:p text:style-name="Body">El pago simulado permite mostrar un flujo de compra completo sin usar una pasarela real. Esto es adecuado para un proyecto academico porque evita manejar dinero y datos bancarios reales.</text:p>
      <table:table table:name="Tabla">
        <table:table-row>
          <table:table-cell office:value-type="string">
            <text:p text:style-name="TableHeader">Metodo</text:p>
          </table:table-cell>
          <table:table-cell office:value-type="string">
            <text:p text:style-name="TableHeader">Campos</text:p>
          </table:table-cell>
          <table:table-cell office:value-type="string">
            <text:p text:style-name="TableHeader">Que se guarda</text:p>
          </table:table-cell>
        </table:table-row>
        <table:table-row>
          <table:table-cell office:value-type="string">
            <text:p text:style-name="TableCell">Tarjeta</text:p>
          </table:table-cell>
          <table:table-cell office:value-type="string">
            <text:p text:style-name="TableCell">Titular, numero, caducidad, CVV</text:p>
          </table:table-cell>
          <table:table-cell office:value-type="string">
            <text:p text:style-name="TableCell">Referencia con ultimos cuatro digitos</text:p>
          </table:table-cell>
        </table:table-row>
        <table:table-row>
          <table:table-cell office:value-type="string">
            <text:p text:style-name="TableCell">Bizum</text:p>
          </table:table-cell>
          <table:table-cell office:value-type="string">
            <text:p text:style-name="TableCell">Telefono Bizum</text:p>
          </table:table-cell>
          <table:table-cell office:value-type="string">
            <text:p text:style-name="TableCell">Referencia Bizum simulada</text:p>
          </table:table-cell>
        </table:table-row>
        <table:table-row>
          <table:table-cell office:value-type="string">
            <text:p text:style-name="TableCell">Efectivo</text:p>
          </table:table-cell>
          <table:table-cell office:value-type="string">
            <text:p text:style-name="TableCell">Sin campos extra</text:p>
          </table:table-cell>
          <table:table-cell office:value-type="string">
            <text:p text:style-name="TableCell">Pago pendiente en efectivo</text:p>
          </table:table-cell>
        </table:table-row>
      </table:table>
      <text:p text:style-name="Body">Nunca se almacena el numero completo de la tarjeta. Esta decision mejora la seguridad y facilita explicar que el pago es solo una simulacion.</text:p>
      <text:p text:style-name="PageBreak"/>
      <text:h text:outline-level="1" text:style-name="Heading_1">11. Envio y recogida</text:h>
      <text:p text:style-name="Body">El sistema permite elegir domicilio o recogida. Si el cliente elige domicilio, se suman 5,00 EUR por desplazamiento. Si elige recogida en local, el envio es 0,00 EUR.</text:p>
      <text:p text:style-name="Body">El pedido minimo es de 12,00 EUR antes de gastos de envio. Esto evita pedidos demasiado pequenos.</text:p>
      <table:table table:name="Tabla">
        <table:table-row>
          <table:table-cell office:value-type="string">
            <text:p text:style-name="TableHeader">Tipo</text:p>
          </table:table-cell>
          <table:table-cell office:value-type="string">
            <text:p text:style-name="TableHeader">Envio</text:p>
          </table:table-cell>
          <table:table-cell office:value-type="string">
            <text:p text:style-name="TableHeader">Explicacion</text:p>
          </table:table-cell>
        </table:table-row>
        <table:table-row>
          <table:table-cell office:value-type="string">
            <text:p text:style-name="TableCell">Domicilio</text:p>
          </table:table-cell>
          <table:table-cell office:value-type="string">
            <text:p text:style-name="TableCell">5,00 EUR</text:p>
          </table:table-cell>
          <table:table-cell office:value-type="string">
            <text:p text:style-name="TableCell">Coste por desplazamiento</text:p>
          </table:table-cell>
        </table:table-row>
        <table:table-row>
          <table:table-cell office:value-type="string">
            <text:p text:style-name="TableCell">Recogida</text:p>
          </table:table-cell>
          <table:table-cell office:value-type="string">
            <text:p text:style-name="TableCell">0,00 EUR</text:p>
          </table:table-cell>
          <table:table-cell office:value-type="string">
            <text:p text:style-name="TableCell">El cliente recoge en local</text:p>
          </table:table-cell>
        </table:table-row>
      </table:table>
      <text:p text:style-name="PageBreak"/>
      <text:h text:outline-level="1" text:style-name="Heading_1">12. Reservas</text:h>
      <text:p text:style-name="Body">La reserva de mesa es independiente del pago. El cliente solo introduce datos de contacto, fecha, hora, numero de personas, zona, ocasion y notas.</text:p>
      <text:p text:style-name="Body">Las zonas disponibles son sala, terraza y barra sushi. El administrador puede confirmar o cancelar la reserva desde el panel interno.</text:p>
      <text:p text:style-name="CaptureTitle">CAPTURA PENDIENTE: reservas</text:p>
      <text:p text:style-name="Capture">Inserta una captura del formulario de reserva.</text:p>
      <text:p text:style-name="PageBreak"/>
      <text:h text:outline-level="1" text:style-name="Heading_1">13. Horarios</text:h>
      <text:p text:style-name="Body">Los horarios se aplican tanto a pedidos como a reservas. La fecha seleccionada determina que horas aparecen disponibles.</text:p>
      <table:table table:name="Tabla">
        <table:table-row>
          <table:table-cell office:value-type="string">
            <text:p text:style-name="TableHeader">Dia</text:p>
          </table:table-cell>
          <table:table-cell office:value-type="string">
            <text:p text:style-name="TableHeader">Comida</text:p>
          </table:table-cell>
          <table:table-cell office:value-type="string">
            <text:p text:style-name="TableHeader">Cena</text:p>
          </table:table-cell>
        </table:table-row>
        <table:table-row>
          <table:table-cell office:value-type="string">
            <text:p text:style-name="TableCell">Lunes a jueves</text:p>
          </table:table-cell>
          <table:table-cell office:value-type="string">
            <text:p text:style-name="TableCell">13:00 - 16:00</text:p>
          </table:table-cell>
          <table:table-cell office:value-type="string">
            <text:p text:style-name="TableCell">20:00 - 23:30</text:p>
          </table:table-cell>
        </table:table-row>
        <table:table-row>
          <table:table-cell office:value-type="string">
            <text:p text:style-name="TableCell">Viernes y sabado</text:p>
          </table:table-cell>
          <table:table-cell office:value-type="string">
            <text:p text:style-name="TableCell">13:00 - 16:30</text:p>
          </table:table-cell>
          <table:table-cell office:value-type="string">
            <text:p text:style-name="TableCell">20:00 - 00:00</text:p>
          </table:table-cell>
        </table:table-row>
        <table:table-row>
          <table:table-cell office:value-type="string">
            <text:p text:style-name="TableCell">Domingo</text:p>
          </table:table-cell>
          <table:table-cell office:value-type="string">
            <text:p text:style-name="TableCell">13:00 - 16:00</text:p>
          </table:table-cell>
          <table:table-cell office:value-type="string">
            <text:p text:style-name="TableCell">20:00 - 23:00</text:p>
          </table:table-cell>
        </table:table-row>
      </table:table>
      <text:p text:style-name="Body">Viernes y sabado la ultima franja seleccionable es 23:30 porque el cierre es a las 00:00. JavaScript desactiva horas pasadas si se elige el dia actual, y PHP vuelve a validar la hora para impedir manipulaciones.</text:p>
      <text:p text:style-name="PageBreak"/>
      <text:h text:outline-level="1" text:style-name="Heading_1">14. Panel de administracion</text:h>
      <text:p text:style-name="Body">El panel de administracion esta protegido por login. Las credenciales actuales son usuario admin y contrasena shushiara123.</text:p>
      <text:p text:style-name="Body">Desde pedidos se pueden ver datos del cliente, direccion, productos, total, metodo de pago, referencia del pago simulado y estado. Desde reservas se pueden ver fecha, hora, personas, zona y estado.</text:p>
      <table:table table:name="Tabla">
        <table:table-row>
          <table:table-cell office:value-type="string">
            <text:p text:style-name="TableHeader">Pagina</text:p>
          </table:table-cell>
          <table:table-cell office:value-type="string">
            <text:p text:style-name="TableHeader">Funcion</text:p>
          </table:table-cell>
        </table:table-row>
        <table:table-row>
          <table:table-cell office:value-type="string">
            <text:p text:style-name="TableCell">login.php</text:p>
          </table:table-cell>
          <table:table-cell office:value-type="string">
            <text:p text:style-name="TableCell">Acceso interno</text:p>
          </table:table-cell>
        </table:table-row>
        <table:table-row>
          <table:table-cell office:value-type="string">
            <text:p text:style-name="TableCell">pedidos.php</text:p>
          </table:table-cell>
          <table:table-cell office:value-type="string">
            <text:p text:style-name="TableCell">Gestion de pedidos</text:p>
          </table:table-cell>
        </table:table-row>
        <table:table-row>
          <table:table-cell office:value-type="string">
            <text:p text:style-name="TableCell">reservas.php</text:p>
          </table:table-cell>
          <table:table-cell office:value-type="string">
            <text:p text:style-name="TableCell">Gestion de reservas</text:p>
          </table:table-cell>
        </table:table-row>
        <table:table-row>
          <table:table-cell office:value-type="string">
            <text:p text:style-name="TableCell">salir.php</text:p>
          </table:table-cell>
          <table:table-cell office:value-type="string">
            <text:p text:style-name="TableCell">Cerrar sesion</text:p>
          </table:table-cell>
        </table:table-row>
      </table:table>
      <text:p text:style-name="PageBreak"/>
      <text:h text:outline-level="1" text:style-name="Heading_1">15. Seguridad</text:h>
      <text:p text:style-name="Body">La seguridad se basa en medidas adecuadas al alcance del proyecto: sesiones PHP, contrasenas hasheadas, PDO, consultas preparadas y validaciones del lado servidor.</text:p>
      <text:list text:style-name="BulletList">
        <text:list-item>
          <text:p text:style-name="Body">La contrasena no se guarda en texto plano.</text:p>
        </text:list-item>
        <text:list-item>
          <text:p text:style-name="Body">Las paginas internas llaman a exigir_admin().</text:p>
        </text:list-item>
        <text:list-item>
          <text:p text:style-name="Body">Los precios se recalculan en PHP.</text:p>
        </text:list-item>
        <text:list-item>
          <text:p text:style-name="Body">No se guardan tarjetas completas.</text:p>
        </text:list-item>
        <text:list-item>
          <text:p text:style-name="Body">Los horarios se validan en PHP aunque JavaScript ya los filtre.</text:p>
        </text:list-item>
      </text:list>
      <text:p text:style-name="PageBreak"/>
      <text:h text:outline-level="1" text:style-name="Heading_1">16. Validaciones</text:h>
      <table:table table:name="Tabla">
        <table:table-row>
          <table:table-cell office:value-type="string">
            <text:p text:style-name="TableHeader">Modulo</text:p>
          </table:table-cell>
          <table:table-cell office:value-type="string">
            <text:p text:style-name="TableHeader">Validacion</text:p>
          </table:table-cell>
          <table:table-cell office:value-type="string">
            <text:p text:style-name="TableHeader">Mensaje o efecto</text:p>
          </table:table-cell>
        </table:table-row>
        <table:table-row>
          <table:table-cell office:value-type="string">
            <text:p text:style-name="TableCell">Pedidos</text:p>
          </table:table-cell>
          <table:table-cell office:value-type="string">
            <text:p text:style-name="TableCell">Carrito no vacio</text:p>
          </table:table-cell>
          <table:table-cell office:value-type="string">
            <text:p text:style-name="TableCell">No permite enviar sin productos</text:p>
          </table:table-cell>
        </table:table-row>
        <table:table-row>
          <table:table-cell office:value-type="string">
            <text:p text:style-name="TableCell">Pedidos</text:p>
          </table:table-cell>
          <table:table-cell office:value-type="string">
            <text:p text:style-name="TableCell">Telefono valido</text:p>
          </table:table-cell>
          <table:table-cell office:value-type="string">
            <text:p text:style-name="TableCell">Acepta 600123456, 600 123 456 o +34 600 123 456</text:p>
          </table:table-cell>
        </table:table-row>
        <table:table-row>
          <table:table-cell office:value-type="string">
            <text:p text:style-name="TableCell">Pedidos</text:p>
          </table:table-cell>
          <table:table-cell office:value-type="string">
            <text:p text:style-name="TableCell">Hora obligatoria</text:p>
          </table:table-cell>
          <table:table-cell office:value-type="string">
            <text:p text:style-name="TableCell">Selecciona la hora de entrega</text:p>
          </table:table-cell>
        </table:table-row>
        <table:table-row>
          <table:table-cell office:value-type="string">
            <text:p text:style-name="TableCell">Pedidos</text:p>
          </table:table-cell>
          <table:table-cell office:value-type="string">
            <text:p text:style-name="TableCell">Pedido minimo</text:p>
          </table:table-cell>
          <table:table-cell office:value-type="string">
            <text:p text:style-name="TableCell">Minimo 12,00 EUR</text:p>
          </table:table-cell>
        </table:table-row>
        <table:table-row>
          <table:table-cell office:value-type="string">
            <text:p text:style-name="TableCell">Reservas</text:p>
          </table:table-cell>
          <table:table-cell office:value-type="string">
            <text:p text:style-name="TableCell">Fecha no pasada</text:p>
          </table:table-cell>
          <table:table-cell office:value-type="string">
            <text:p text:style-name="TableCell">Rechaza fechas anteriores</text:p>
          </table:table-cell>
        </table:table-row>
        <table:table-row>
          <table:table-cell office:value-type="string">
            <text:p text:style-name="TableCell">Reservas</text:p>
          </table:table-cell>
          <table:table-cell office:value-type="string">
            <text:p text:style-name="TableCell">Personas maximo 16</text:p>
          </table:table-cell>
          <table:table-cell office:value-type="string">
            <text:p text:style-name="TableCell">Pide llamar para grupos grandes</text:p>
          </table:table-cell>
        </table:table-row>
      </table:table>
      <text:p text:style-name="Body">Estas validaciones hacen que el proyecto sea mas realista y evitan registros incorrectos en la base de datos.</text:p>
      <text:p text:style-name="PageBreak"/>
      <text:h text:outline-level="1" text:style-name="Heading_1">17. Pruebas realizadas</text:h>
      <table:table table:name="Tabla">
        <table:table-row>
          <table:table-cell office:value-type="string">
            <text:p text:style-name="TableHeader">Prueba</text:p>
          </table:table-cell>
          <table:table-cell office:value-type="string">
            <text:p text:style-name="TableHeader">Resultado esperado</text:p>
          </table:table-cell>
          <table:table-cell office:value-type="string">
            <text:p text:style-name="TableHeader">Estado</text:p>
          </table:table-cell>
        </table:table-row>
        <table:table-row>
          <table:table-cell office:value-type="string">
            <text:p text:style-name="TableCell">Pedido Bizum con 600 123 456</text:p>
          </table:table-cell>
          <table:table-cell office:value-type="string">
            <text:p text:style-name="TableCell">Aceptado</text:p>
          </table:table-cell>
          <table:table-cell office:value-type="string">
            <text:p text:style-name="TableCell">Correcto</text:p>
          </table:table-cell>
        </table:table-row>
        <table:table-row>
          <table:table-cell office:value-type="string">
            <text:p text:style-name="TableCell">Domicilio</text:p>
          </table:table-cell>
          <table:table-cell office:value-type="string">
            <text:p text:style-name="TableCell">Suma 5,00 EUR</text:p>
          </table:table-cell>
          <table:table-cell office:value-type="string">
            <text:p text:style-name="TableCell">Correcto</text:p>
          </table:table-cell>
        </table:table-row>
        <table:table-row>
          <table:table-cell office:value-type="string">
            <text:p text:style-name="TableCell">Recogida</text:p>
          </table:table-cell>
          <table:table-cell office:value-type="string">
            <text:p text:style-name="TableCell">Envio 0,00 EUR</text:p>
          </table:table-cell>
          <table:table-cell office:value-type="string">
            <text:p text:style-name="TableCell">Correcto</text:p>
          </table:table-cell>
        </table:table-row>
        <table:table-row>
          <table:table-cell office:value-type="string">
            <text:p text:style-name="TableCell">Domingo 23:30</text:p>
          </table:table-cell>
          <table:table-cell office:value-type="string">
            <text:p text:style-name="TableCell">Rechazado</text:p>
          </table:table-cell>
          <table:table-cell office:value-type="string">
            <text:p text:style-name="TableCell">Correcto</text:p>
          </table:table-cell>
        </table:table-row>
        <table:table-row>
          <table:table-cell office:value-type="string">
            <text:p text:style-name="TableCell">Domingo 22:30</text:p>
          </table:table-cell>
          <table:table-cell office:value-type="string">
            <text:p text:style-name="TableCell">Aceptado</text:p>
          </table:table-cell>
          <table:table-cell office:value-type="string">
            <text:p text:style-name="TableCell">Correcto</text:p>
          </table:table-cell>
        </table:table-row>
        <table:table-row>
          <table:table-cell office:value-type="string">
            <text:p text:style-name="TableCell">Login admin</text:p>
          </table:table-cell>
          <table:table-cell office:value-type="string">
            <text:p text:style-name="TableCell">Redirige a pedidos.php</text:p>
          </table:table-cell>
          <table:table-cell office:value-type="string">
            <text:p text:style-name="TableCell">Correcto</text:p>
          </table:table-cell>
        </table:table-row>
      </table:table>
      <text:p text:style-name="Body">Tambien se comprobaron errores de sintaxis PHP y JavaScript durante el desarrollo.</text:p>
      <text:p text:style-name="PageBreak"/>
      <text:h text:outline-level="1" text:style-name="Heading_1">18. Manual de instalacion</text:h>
      <text:list text:style-name="BulletList">
        <text:list-item>
          <text:p text:style-name="Body">Instalar XAMPP.</text:p>
        </text:list-item>
        <text:list-item>
          <text:p text:style-name="Body">Activar Apache y MySQL.</text:p>
        </text:list-item>
        <text:list-item>
          <text:p text:style-name="Body">Copiar sushiara en C:\xampp\htdocs.</text:p>
        </text:list-item>
        <text:list-item>
          <text:p text:style-name="Body">Entrar en http://localhost/phpmyadmin.</text:p>
        </text:list-item>
        <text:list-item>
          <text:p text:style-name="Body">Importar base_de_datos/esquema.sql.</text:p>
        </text:list-item>
        <text:list-item>
          <text:p text:style-name="Body">Abrir http://localhost/sushiara/.</text:p>
        </text:list-item>
      </text:list>
      <text:p text:style-name="Body">La conexion por defecto usa host localhost, base de datos sushiara, usuario root y contrasena vacia, que es la configuracion habitual de XAMPP.</text:p>
      <text:p text:style-name="PageBreak"/>
      <text:h text:outline-level="1" text:style-name="Heading_1">19. Manual de usuario cliente</text:h>
      <text:h text:outline-level="2" text:style-name="Heading_2">19.1 Hacer pedido</text:h>
      <text:list text:style-name="BulletList">
        <text:list-item>
          <text:p text:style-name="Body">Entrar en Carta.</text:p>
        </text:list-item>
        <text:list-item>
          <text:p text:style-name="Body">Filtrar o buscar productos.</text:p>
        </text:list-item>
        <text:list-item>
          <text:p text:style-name="Body">Anadir productos al carrito.</text:p>
        </text:list-item>
        <text:list-item>
          <text:p text:style-name="Body">Elegir domicilio o recogida.</text:p>
        </text:list-item>
        <text:list-item>
          <text:p text:style-name="Body">Rellenar datos.</text:p>
        </text:list-item>
        <text:list-item>
          <text:p text:style-name="Body">Elegir fecha y hora.</text:p>
        </text:list-item>
        <text:list-item>
          <text:p text:style-name="Body">Seleccionar pago simulado.</text:p>
        </text:list-item>
        <text:list-item>
          <text:p text:style-name="Body">Enviar pedido.</text:p>
        </text:list-item>
      </text:list>
      <text:h text:outline-level="2" text:style-name="Heading_2">19.2 Reservar mesa</text:h>
      <text:list text:style-name="BulletList">
        <text:list-item>
          <text:p text:style-name="Body">Entrar en Reservar.</text:p>
        </text:list-item>
        <text:list-item>
          <text:p text:style-name="Body">Rellenar nombre y telefono.</text:p>
        </text:list-item>
        <text:list-item>
          <text:p text:style-name="Body">Elegir fecha y hora disponible.</text:p>
        </text:list-item>
        <text:list-item>
          <text:p text:style-name="Body">Indicar personas y zona.</text:p>
        </text:list-item>
        <text:list-item>
          <text:p text:style-name="Body">Enviar reserva.</text:p>
        </text:list-item>
      </text:list>
      <text:p text:style-name="PageBreak"/>
      <text:h text:outline-level="1" text:style-name="Heading_1">20. Manual de administrador</text:h>
      <text:p text:style-name="Body">El administrador accede desde administracion/login.php con usuario admin y contrasena shushiara123.</text:p>
      <text:list text:style-name="BulletList">
        <text:list-item>
          <text:p text:style-name="Body">Revisar pedidos recibidos.</text:p>
        </text:list-item>
        <text:list-item>
          <text:p text:style-name="Body">Cambiar estado de pedido.</text:p>
        </text:list-item>
        <text:list-item>
          <text:p text:style-name="Body">Ver referencia de pago simulado.</text:p>
        </text:list-item>
        <text:list-item>
          <text:p text:style-name="Body">Revisar reservas.</text:p>
        </text:list-item>
        <text:list-item>
          <text:p text:style-name="Body">Confirmar o cancelar reservas.</text:p>
        </text:list-item>
        <text:list-item>
          <text:p text:style-name="Body">Cerrar sesion con Salir.</text:p>
        </text:list-item>
      </text:list>
      <text:p text:style-name="PageBreak"/>
      <text:h text:outline-level="1" text:style-name="Heading_1">21. Capturas pendientes recomendadas</text:h>
      <text:list text:style-name="BulletList">
        <text:list-item>
          <text:p text:style-name="Body">Portada principal.</text:p>
        </text:list-item>
        <text:list-item>
          <text:p text:style-name="Body">Carta con carrito.</text:p>
        </text:list-item>
        <text:list-item>
          <text:p text:style-name="Body">Formulario de pago simulado.</text:p>
        </text:list-item>
        <text:list-item>
          <text:p text:style-name="Body">Formulario de reserva.</text:p>
        </text:list-item>
        <text:list-item>
          <text:p text:style-name="Body">Panel de pedidos.</text:p>
        </text:list-item>
        <text:list-item>
          <text:p text:style-name="Body">Panel de reservas.</text:p>
        </text:list-item>
        <text:list-item>
          <text:p text:style-name="Body">phpMyAdmin con tablas.</text:p>
        </text:list-item>
        <text:list-item>
          <text:p text:style-name="Body">Estructura de carpetas en el explorador.</text:p>
        </text:list-item>
        <text:list-item>
          <text:p text:style-name="Body">Fragmento de servicios/pedidos.php.</text:p>
        </text:list-item>
        <text:list-item>
          <text:p text:style-name="Body">Fragmento de base_de_datos/esquema.sql.</text:p>
        </text:list-item>
      </text:list>
      <text:p text:style-name="Body">Estas capturas se pueden insertar manualmente antes de entregar la memoria definitiva. Los apartados marcados como CAPTURA PENDIENTE indican donde encajan mejor.</text:p>
      <text:p text:style-name="PageBreak"/>
      <text:h text:outline-level="1" text:style-name="Heading_1">22. Conclusiones</text:h>
      <text:p text:style-name="Body">Shushiara es un proyecto completo para 2DAW porque incluye interfaz publica, interaccion con JavaScript, backend en PHP, base de datos relacional, validaciones, sesiones y documentacion.</text:p>
      <text:p text:style-name="Body">La aplicacion demuestra un flujo realista de restaurante: el cliente puede pedir o reservar, y el administrador puede gestionar la informacion recibida.</text:p>
      <text:p text:style-name="Body">Como mejoras futuras se podrian anadir pasarela de pago real, correos de confirmacion, gestion CRUD de productos, roles de usuario, estadisticas y exportaciones.</text:p>
      <text:p text:style-name="PageBreak"/>
      <text:h text:outline-level="1" text:style-name="Heading_1">23. Detalle tecnico del carrito</text:h>
      <text:p text:style-name="Body">El carrito utiliza el identificador del producto como clave. Esto evita duplicar el mismo producto varias veces y permite aumentar o reducir cantidades.</text:p>
      <text:p text:style-name="Body">La actualizacion visual del carrito recalcula contador, subtotal, envio y total. Este calculo mejora la experiencia, aunque el calculo definitivo lo hace PHP.</text:p>
      <text:p text:style-name="CaptureTitle">CAPTURA O NOTA OPCIONAL</text:p>
      <text:p text:style-name="Capture">Puedes insertar una imagen, fragmento de codigo o explicacion adicional relacionada con este apartado.</text:p>
      <text:p text:style-name="PageBreak"/>
      <text:h text:outline-level="1" text:style-name="Heading_1">24. Detalle tecnico de pedidos.php</text:h>
      <text:p text:style-name="Body">El servicio pedidos.php recibe JSON y no acepta otros metodos que no sean POST. Valida el cliente, telefono, tipo de entrega, metodo de pago, fecha, hora y articulos.</text:p>
      <text:p text:style-name="Body">Despues consulta productos activos en MySQL y comprueba que todos existan. Finalmente guarda el pedido dentro de una transaccion.</text:p>
      <text:p text:style-name="CaptureTitle">CAPTURA O NOTA OPCIONAL</text:p>
      <text:p text:style-name="Capture">Puedes insertar una imagen, fragmento de codigo o explicacion adicional relacionada con este apartado.</text:p>
      <text:p text:style-name="PageBreak"/>
      <text:h text:outline-level="1" text:style-name="Heading_1">25. Detalle tecnico de reservas.php</text:h>
      <text:p text:style-name="Body">El servicio reservas.php valida telefono, email, fecha, hora, personas y zona. La hora se compara con el horario real del dia seleccionado.</text:p>
      <text:p text:style-name="Body">La reserva no necesita transaccion compleja porque se guarda en una sola tabla, pero igualmente se controla con try/catch.</text:p>
      <text:p text:style-name="CaptureTitle">CAPTURA O NOTA OPCIONAL</text:p>
      <text:p text:style-name="Capture">Puedes insertar una imagen, fragmento de codigo o explicacion adicional relacionada con este apartado.</text:p>
      <text:p text:style-name="PageBreak"/>
      <text:h text:outline-level="1" text:style-name="Heading_1">26. Detalle de administracion</text:h>
      <text:p text:style-name="Body">La administracion no debe estar pensada para el cliente final, por eso no se muestra como parte principal de la navegacion publica.</text:p>
      <text:p text:style-name="Body">El panel permite consultar rapidamente datos operativos sin entrar en phpMyAdmin.</text:p>
      <text:p text:style-name="CaptureTitle">CAPTURA O NOTA OPCIONAL</text:p>
      <text:p text:style-name="Capture">Puedes insertar una imagen, fragmento de codigo o explicacion adicional relacionada con este apartado.</text:p>
      <text:p text:style-name="PageBreak"/>
      <text:h text:outline-level="1" text:style-name="Heading_1">27. Detalle de documentacion</text:h>
      <text:p text:style-name="Body">El README explica instalacion, rutas, credenciales, reglas de negocio y validaciones. AGENTS.md recoge contexto y reglas de mantenimiento.</text:p>
      <text:p text:style-name="Body">La memoria ODT desarrolla la explicacion academica y deja huecos claros para capturas.</text:p>
      <text:p text:style-name="CaptureTitle">CAPTURA O NOTA OPCIONAL</text:p>
      <text:p text:style-name="Capture">Puedes insertar una imagen, fragmento de codigo o explicacion adicional relacionada con este apartado.</text:p>
      <text:p text:style-name="PageBreak"/>
      <text:h text:outline-level="1" text:style-name="Heading_1">28. Preparacion para defensa</text:h>
      <text:p text:style-name="Body">Una defensa ordenada puede empezar por la portada, seguir por carta y carrito, realizar un pedido de prueba, mostrar phpMyAdmin y terminar con el panel admin.</text:p>
      <text:p text:style-name="Body">Despues se puede explicar el codigo de pedidos.php, la base de datos y las validaciones mas importantes.</text:p>
      <text:p text:style-name="CaptureTitle">CAPTURA O NOTA OPCIONAL</text:p>
      <text:p text:style-name="Capture">Puedes insertar una imagen, fragmento de codigo o explicacion adicional relacionada con este apartado.</text:p>
      <text:p text:style-name="PageBreak"/>
      <text:h text:outline-level="1" text:style-name="Heading_1">29. Riesgos y limites</text:h>
      <text:p text:style-name="Body">El sistema no sustituye a una tienda real porque no integra pago real ni envio de correos. Esto es intencionado para mantener el alcance academico.</text:p>
      <text:p text:style-name="Body">La seguridad es correcta para entorno local, aunque en produccion haria falta HTTPS, variables de entorno, proteccion CSRF y control de roles mas avanzado.</text:p>
      <text:p text:style-name="CaptureTitle">CAPTURA O NOTA OPCIONAL</text:p>
      <text:p text:style-name="Capture">Puedes insertar una imagen, fragmento de codigo o explicacion adicional relacionada con este apartado.</text:p>
      <text:p text:style-name="PageBreak"/>
      <text:h text:outline-level="1" text:style-name="Heading_1">30. Valoracion final</text:h>
      <text:p text:style-name="Body">El proyecto esta suficientemente completo para mostrar competencias de frontend, backend y base de datos.</text:p>
      <text:p text:style-name="Body">La organizacion en carpetas, la documentacion y las validaciones ayudan a que sea defendible y no parezca solo una maqueta visual.</text:p>
      <text:p text:style-name="CaptureTitle">CAPTURA O NOTA OPCIONAL</text:p>
      <text:p text:style-name="Capture">Puedes insertar una imagen, fragmento de codigo o explicacion adicional relacionada con este apar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office:version="1.2">
  <office:font-face-decls>
    <style:font-face style:name="Arial" svg:font-family="Arial"/>
    <style:font-face style:name="Consolas" svg:font-family="Consolas"/>
  </office:font-face-decls>
  <office:styles>
    <style:default-style style:family="paragraph">
      <style:text-properties style:font-name="Arial" fo:font-size="11pt"/>
    </style:default-style>
  </office:styles>
  <office:automatic-styles>
    <style:page-layout style:name="pm1">
      <style:page-layout-properties fo:page-width="21cm" fo:page-height="29.7cm" style:num-format="1" fo:margin-top="2cm" fo:margin-bottom="2cm" fo:margin-left="2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dc:title>Memoria del proyecto Shushiara</dc:title>
    <dc:creator>Codex</dc:creator>
    <meta:creation-date>2026-05-07T12:08:00.799683</meta:creation-date>
  </office:meta>
</office:document-meta>
</file>